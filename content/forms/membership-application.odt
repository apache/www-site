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1" style:font-size-asian="9pt" style:font-name-complex="Courier1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style:text-line-through-style="none" style:font-name="Courier" fo:font-size="11pt" fo:font-style="normal" style:text-underline-style="none"/>
    </style:style>
    <style:style style:name="T1" style:family="text">
      <style:text-properties style:font-name="Chalkboard" fo:font-size="18pt" style:font-size-asian="18pt" style:font-size-complex="18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text form:name="Full 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al 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-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1.227cm" svg:height="3.302cm" draw:z-index="8"><draw:image xlink:href="Pictures/10000000000008000000025AFA7E0227.jpg" xlink:type="simple" xlink:show="embed" xlink:actuate="onLoad"/></draw:frame></text:p>
      <text:p text:style-name="P1">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2"/><text:span text:style-name="T1">Membership Application</text:span> </text:p>
      <text:p text:style-name="P1"/>
      <text:p text:style-name="P1">Thank you for your interest in The Apache Software Foundation (the</text:p>
      <text:p text:style-name="P1">"Foundation"). This form is to be used only by people who have been elected by a vote of the Membership and who have received an invitation to apply. </text:p>
      <text:p text:style-name="P1"/>
      <text:p text:style-name="P1">To apply for membership, please complete this application,</text:p>
      <text:p text:style-name="P1">sign, scan, and attach it to an email to <text:a xlink:type="simple" xlink:href="mailto:secretary@apache.org" text:style-name="Internet_20_link" text:visited-style-name="Visited_20_Internet_20_Link">secretary@apache.org</text:a></text:p>
      <text:p text:style-name="P1">You can also sign with a digital signature and email both the document and the detached signature.</text:p>
      <text:p text:style-name="P2"><text:span text:style-name="T3">Or, use a pdf form application, annotate your signature, save the file, and email the pdf to </text:span><text:a xlink:type="simple" xlink:href="mailto:secretary@apache.org" text:style-name="Internet_20_link" text:visited-style-name="Visited_20_Internet_20_Link"><text:span text:style-name="T3">secretary@apache.org</text:span></text:a></text:p>
      <text:p text:style-name="P2"><text:span text:style-name="T2">For tips on annotating your signature, this may help: </text:span><text:a xlink:type="simple" xlink:href="https://s.apache.org/cla-printer" text:style-name="Internet_20_link" text:visited-style-name="Visited_20_Internet_20_Link"><text:span text:style-name="T2">https://s.apache.org/cla-printer</text:span></text:a></text:p>
      <text:p text:style-name="P3"/>
      <text:p text:style-name="P1">Please read this document carefully before signing and keep the original for your records.</text:p>
      <text:p text:style-name="P1"/>
      <text:p text:style-name="P1"><draw:control text:anchor-type="char" draw:z-index="0" draw:style-name="gr1" draw:text-style-name="P4" svg:width="14.361cm" svg:height="0.696cm" svg:x="2.595cm" svg:y="0.09cm" draw:control="control1"/>Full</text:p>
      <text:p text:style-name="P1">name: <text:s text:c="5"/>______________________________________________________________</text:p>
      <text:p text:style-name="P1"/>
      <text:p text:style-name="P1">Residential<draw:control text:anchor-type="char" draw:z-index="1" draw:style-name="gr1" draw:text-style-name="P4" svg:width="14.458cm" svg:height="0.696cm" svg:x="2.499cm" svg:y="0.115cm" draw:control="control2"/></text:p>
      <text:p text:style-name="P1">Address: <text:s text:c="2"/>______________________________________________________________</text:p>
      <text:p text:style-name="P1"><draw:control text:anchor-type="char" draw:z-index="2" draw:style-name="gr1" draw:text-style-name="P4" svg:width="14.521cm" svg:height="0.696cm" svg:x="2.499cm" svg:y="0.049cm" draw:control="control3"/></text:p>
      <text:p text:style-name="P1"><text:s text:c="11"/>______________________________________________________________</text:p>
      <text:p text:style-name="P1"><draw:control text:anchor-type="char" draw:z-index="3" draw:style-name="gr1" draw:text-style-name="P4" svg:width="14.421cm" svg:height="0.696cm" svg:x="2.545cm" svg:y="0.083cm" draw:control="control4"/></text:p>
      <text:p text:style-name="P1"><text:s text:c="11"/>______________________________________________________________</text:p>
      <text:p text:style-name="P1"><draw:control text:anchor-type="char" draw:z-index="4" draw:style-name="gr1" draw:text-style-name="P4" svg:width="14.459cm" svg:height="0.696cm" svg:x="2.545cm" svg:y="0.099cm" draw:control="control5"/></text:p>
      <text:p text:style-name="P1">Country: <text:s text:c="2"/>______________________________________________________________</text:p>
      <text:p text:style-name="P1"><draw:control text:anchor-type="char" draw:z-index="5" draw:style-name="gr1" draw:text-style-name="P4" svg:width="14.394cm" svg:height="0.696cm" svg:x="2.561cm" svg:y="0.065cm" draw:control="control6"/></text:p>
      <text:p text:style-name="P1">ASF id: <text:s text:c="3"/>______________________________________________________________</text:p>
      <text:p text:style-name="P1"><draw:control text:anchor-type="char" draw:z-index="6" draw:style-name="gr1" draw:text-style-name="P4" svg:width="14.428cm" svg:height="0.696cm" svg:x="2.545cm" svg:y="0.083cm" draw:control="control7"/></text:p>
      <text:p text:style-name="P1">E-Mail: <text:s text:c="3"/>______________________________________________________________</text:p>
      <text:p text:style-name="P1"/>
      <text:p text:style-name="P1"/>
      <text:p text:style-name="P1">Membership in the Foundation carries certain responsibilities. Your</text:p>
      <text:p text:style-name="P1">membership is conditioned upon your acceptance of the Foundation's</text:p>
      <text:p text:style-name="P1">Bylaws, available at <text:a xlink:type="simple" xlink:href="http://www.apache.org/foundation/bylaws.html" text:style-name="Internet_20_link" text:visited-style-name="Visited_20_Internet_20_Link">http://www.apache.org/foundation/bylaws.html</text:a> .</text:p>
      <text:p text:style-name="P1"/>
      <text:p text:style-name="P1">I have read and understand the Bylaws of The Apache Software Foundation and I wish to become a member in accordance with those Bylaws.</text:p>
      <text:p text:style-name="P1"/>
      <text:p text:style-name="P1"/>
      <text:p text:style-name="P1"><draw:control text:anchor-type="char" draw:z-index="7" draw:style-name="gr1" draw:text-style-name="P4" svg:width="4.896cm" svg:height="0.877cm" svg:x="12.086cm" svg:y="0.346cm" draw:control="control8"/></text:p>
      <text:p text:style-name="P1"/>
      <text:p text:style-name="P1">Please sign: ________________________________ Date: 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6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dc:date>2026-03-16T14:17:17</dc:date>
    <meta:editing-cycles>17</meta:editing-cycles>
    <meta:editing-duration>P4DT23H25M47S</meta:editing-duration>
    <meta:document-statistic meta:table-count="0" meta:image-count="1" meta:object-count="0" meta:page-count="1" meta:paragraph-count="24" meta:word-count="184" meta:character-count="1719"/>
    <meta:user-defined meta:name="Info 1"/>
    <meta:user-defined meta:name="Info 2"/>
    <meta:user-defined meta:name="Info 3"/>
    <meta:user-defined meta:name="Info 4"/>
  </office:meta>
</office:document-meta>
</file>