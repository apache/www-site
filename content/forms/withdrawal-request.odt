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8000000025AFA7E022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, 'Source Sans Pro', 'Helvetica Neue', Helvetica, Arial, sans-serif"/>
    <style:font-face style:name="Courier" svg:font-family="Courier" style:font-family-generic="modern" style:font-pitch="fixed"/>
    <style:font-face style:name="Chalkboard" svg:font-family="Chalkboard" style:font-pitch="variable"/>
    <style:font-face style:name="Courier New" svg:font-family="'Courier New'" style:font-adornments="Bold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2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Times New Roman" fo:font-size="9pt" style:font-name-asian="Courier" style:font-size-asian="9pt" style:font-name-complex="Courier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halkboard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00%" fo:text-align="start" style:justify-single-word="false" style:text-autospace="none"/>
      <style:text-properties fo:font-variant="normal" fo:text-transform="none" fo:color="#000000" style:font-name="Times New Roman" fo:font-size="9pt" fo:letter-spacing="normal" style:font-name-asian="Courier" style:font-size-asian="9pt" style:font-name-complex="Courier" style:font-size-complex="9pt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>
      <style:paragraph-properties fo:text-align="start"/>
      <style:text-properties style:text-line-through-style="none" style:font-name="Courier New" fo:font-size="11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variant="normal" fo:text-transform="none" fo:color="#333333" style:font-name="Times New Roman" fo:font-size="11pt" fo:letter-spacing="normal" fo:font-style="normal" fo:font-weight="bold" style:font-size-asian="11pt" style:font-size-complex="11pt"/>
    </style:style>
    <style:style style:name="T2" style:family="text">
      <style:text-properties fo:font-variant="normal" fo:text-transform="none" fo:color="#333333" style:font-name="Times New Roman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4643aa" style:text-line-through-style="none" style:font-name="Montserrat" fo:font-size="9.14999961853027pt" fo:letter-spacing="normal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4643aa" style:text-line-through-style="none" style:font-name="Times New Roman" fo:font-size="11pt" fo:letter-spacing="normal" fo:font-style="normal" style:text-underline-style="none" fo:font-weight="bold" style:text-blinking="false" fo:background-color="transparent" style:font-size-asian="11pt" style:font-size-complex="11pt"/>
    </style:style>
    <style:style style:name="T5" style:family="text">
      <style:text-properties fo:font-variant="normal" fo:text-transform="none" style:font-name="Times New Roman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Form" form:apply-filter="true" form:command-type="table" form:control-implementation="ooo:com.sun.star.form.component.Form" office:target-frame="" xlink:href="" xlink:type="simple">
          <form:text form:name="Date" form:control-implementation="ooo:com.sun.star.form.component.TextField" xml:id="control1" form:id="control1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HideInactiveSelection" office:value-type="boolean" office:boolean-value="false"/>
              <form:property form:property-name="ObjIDinMSO" office:value-type="float" office:value=""/>
            </form:properties>
          </form:text>
          <form:text form:name="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pache id" form:control-implementation="ooo:com.sun.star.form.component.TextField" xml:id="control3" form:id="control3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remove from mail lists" form:control-implementation="ooo:com.sun.star.form.component.CheckBox" xml:id="control4" form:id="control4" form:label="Check Box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emove commit" form:control-implementation="ooo:com.sun.star.form.component.CheckBox" xml:id="control5" form:id="control5" form:label="Check Box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emove from moderating mail lists" form:control-implementation="ooo:com.sun.star.form.component.CheckBox" xml:id="control6" form:id="control6" form:label="Check Box 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emove commit" form:control-implementation="ooo:com.sun.star.form.component.CheckBox" xml:id="control7" form:id="control7" form:label="Check Box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1.215cm" svg:height="3.297cm" draw:z-index="7"><draw:image xlink:href="Pictures/10000000000008000000025AFA7E0227.jpg" xlink:type="simple" xlink:show="embed" xlink:actuate="onLoad"/></draw:frame></text:p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P3"/>
      <text:p text:style-name="P3">Membership withdrawal request</text:p>
      <text:p text:style-name="Standard"/>
      <text:p text:style-name="Standard">Dear Apache Secretary,</text:p>
      <text:p text:style-name="Standard"/>
      <text:p text:style-name="Standard">Please withdraw my membership, according to Section 4.6 of the bylaws.</text:p>
      <text:p text:style-name="Standard"><text:a xlink:type="simple" xlink:href="https://www.apache.org/foundation/bylaws.html#members" text:style-name="Internet_20_link" text:visited-style-name="Visited_20_Internet_20_Link">https://www.apache.org/foundation/bylaws.html#members</text:a></text:p>
      <text:p text:style-name="P6"><text:span text:style-name="Strong_20_Emphasis"><text:span text:style-name="T3"/></text:span></text:p>
      <text:p text:style-name="P6"><text:bookmark text:name="4.6"/><text:span text:style-name="Strong_20_Emphasis"><text:span text:style-name="T4">Section 4.6.</text:span></text:span><text:span text:style-name="Strong_20_Emphasis"><text:span text:style-name="T1">Voluntary Withdrawal from Membership. </text:span></text:span><text:span text:style-name="T2">Members (including emeritus members) may withdraw from membership in the corporation at any time upon ten (10) days' written, signed notice delivered to an officer of the corporation.</text:span></text:p>
      <text:p text:style-name="Standard"/>
      <text:p text:style-name="Standard"><draw:control text:anchor-type="paragraph" draw:z-index="0" draw:style-name="gr1" draw:text-style-name="P7" svg:width="10.965cm" svg:height="0.839cm" svg:x="2.159cm" svg:y="0.153cm" draw:control="control2"/></text:p>
      <text:p text:style-name="P1">Full name:</text:p>
      <text:p text:style-name="P1"><text:s text:c="11"/>__________________________________________________________</text:p>
      <text:p text:style-name="Standard"/>
      <text:p text:style-name="P1"><draw:control text:anchor-type="paragraph" draw:z-index="1" draw:style-name="gr1" draw:text-style-name="P7" svg:width="10.997cm" svg:height="0.713cm" svg:x="2.145cm" svg:y="0.125cm" draw:control="control3"/></text:p>
      <text:p text:style-name="P1">Apache id:</text:p>
      <text:p text:style-name="P1"><text:s text:c="11"/>__________________________________________________________</text:p>
      <text:p text:style-name="P1"/>
      <text:p text:style-name="P1"/>
      <text:p text:style-name="P1">[<draw:control text:anchor-type="as-char" svg:y="-0.333cm" draw:z-index="6" draw:style-name="gr2" draw:text-style-name="P8" svg:width="0.366cm" svg:height="0.398cm" draw:control="control7"/>] <text:s/>Remove me from all Project Management Committees</text:p>
      <text:p text:style-name="P1"/>
      <text:p text:style-name="P1">[<draw:control text:anchor-type="as-char" svg:y="-0.333cm" draw:z-index="4" draw:style-name="gr2" draw:text-style-name="P8" svg:width="0.366cm" svg:height="0.398cm" draw:control="control5"/>] <text:s/>Remove my commit privileges from all projects</text:p>
      <text:p text:style-name="P1"/>
      <text:p text:style-name="P1">[<draw:control text:anchor-type="as-char" svg:y="-0.288cm" draw:z-index="3" draw:style-name="gr2" draw:text-style-name="P8" svg:width="0.348cm" svg:height="0.361cm" draw:control="control4"/>] <text:s/>Remove me from all mail lists</text:p>
      <text:p text:style-name="P1"/>
      <text:p text:style-name="P1">[<draw:control text:anchor-type="as-char" svg:y="-0.288cm" draw:z-index="5" draw:style-name="gr2" draw:text-style-name="P8" svg:width="0.348cm" svg:height="0.361cm" draw:control="control6"/>] <text:s/>Remove me from moderating all mail lists</text:p>
      <text:p text:style-name="P1"/>
      <text:p text:style-name="P1"><draw:control text:anchor-type="paragraph" draw:z-index="2" draw:style-name="gr1" draw:text-style-name="P7" svg:width="3.841cm" svg:height="0.74cm" svg:x="9.331cm" svg:y="0.108cm" draw:control="control1"/></text:p>
      <text:p text:style-name="P1"/>
      <text:p text:style-name="P1">Signed: __________________________________ Date: ____________________</text:p>
      <text:p text:style-name="P1"/>
      <text:p text:style-name="P2"/>
      <text:p text:style-name="P2">After completing this form, print, sign, scan and email the pdf to <text:a xlink:type="simple" xlink:href="mailto:secretary@apache.org" text:style-name="Internet_20_link" text:visited-style-name="Visited_20_Internet_20_Link">secretary@apache.org</text:a></text:p>
      <text:p text:style-name="P2"/>
      <text:p text:style-name="P2">Or, use a pdf form application, annotate your signature, save the file, and email the pdf to to <text:a xlink:type="simple" xlink:href="mailto:secretary@apache.org" text:style-name="Internet_20_link" text:visited-style-name="Visited_20_Internet_20_Link">secretary@apache.org</text:a></text:p>
      <text:p text:style-name="P2"><text:span text:style-name="T5">For tips on annotating your signature, this may help: </text:span><text:a xlink:type="simple" xlink:href="https://s.apache.org/cla-printer" text:style-name="Internet_20_link" text:visited-style-name="Visited_20_Internet_20_Link"><text:span text:style-name="T5">https://s.apache.org/cla-printer</text:span></text:a></text:p>
      <text:p text:style-name="P2"/>
      <text:p text:style-name="P2">Alternatively, save this form and sign it with a digital key; upload your public key and </text:p>
      <text:p text:style-name="P2">email the file and detached signature to <text:a xlink:type="simple" xlink:href="mailto:secretary@apache.org" text:style-name="Internet_20_link" text:visited-style-name="Visited_20_Internet_20_Link">secretary@apache.org</text:a>. For information on uploading public keys,</text:p>
      <text:p text:style-name="P2">this may help: <text:a xlink:type="simple" xlink:href="https://s.apache.org/upload-key" text:style-name="Internet_20_link" text:visited-style-name="Visited_20_Internet_20_Link">https://s.apache.org/upload-key</text:a> .</text:p>
      <text:p text:style-name="P5"/>
      <text:p text:style-name="P2">This request will be effective ten days after recei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, 'Source Sans Pro', 'Helvetica Neue', Helvetica, Arial, sans-serif"/>
    <style:font-face style:name="Courier" svg:font-family="Courier" style:font-family-generic="modern" style:font-pitch="fixed"/>
    <style:font-face style:name="Chalkboard" svg:font-family="Chalkboard" style:font-pitch="variable"/>
    <style:font-face style:name="Courier New" svg:font-family="'Courier New'" style:font-adornments="Bold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aig Russell</meta:initial-creator>
    <meta:creation-date>2018-03-12T11:33:14</meta:creation-date>
    <dc:date>2026-03-16T14:12:25</dc:date>
    <meta:editing-duration>P1DT13H9M21S</meta:editing-duration>
    <meta:editing-cycles>39</meta:editing-cycles>
    <meta:generator>OpenOffice/4.1.16$Unix OpenOffice.org_project/4116m3$Build-9816</meta:generator>
    <meta:document-statistic meta:table-count="0" meta:image-count="1" meta:object-count="0" meta:page-count="1" meta:paragraph-count="21" meta:word-count="182" meta:character-count="1400"/>
  </office:meta>
</office:document-meta>
</file>